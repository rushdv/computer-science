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ort Questions and Answers (According to Slides)</text:h>
      <text:h text:style-name="Heading_20_1" text:outline-level="1">Greedy Technique</text:h>
      <text:h text:style-name="Heading_20_2" text:outline-level="2">Q1. What is a greedy algorithm?</text:h>
      <text:p text:style-name="Text_20_body">A greedy algorithm is a problem-solving technique that chooses the best available option at each step without considering future consequences.</text:p>
      <text:h text:style-name="Heading_20_2" text:outline-level="2">Q2. In which type of problems are greedy algorithms mainly used?</text:h>
      <text:p text:style-name="Text_20_body">Greedy algorithms are mainly used in optimization problems.</text:p>
      <text:h text:style-name="Heading_20_2" text:outline-level="2">Q3. What is the Greedy Choice Property?</text:h>
      <text:p text:style-name="Text_20_body">It means the optimal solution can be achieved by making the locally best choice at every step.</text:p>
      <text:h text:style-name="Heading_20_2" text:outline-level="2">Q4. What is Optimal Substructure?</text:h>
      <text:p text:style-name="Text_20_body">Optimal substructure means the optimal solution contains optimal solutions of its subproblems.</text:p>
      <text:h text:style-name="Heading_20_2" text:outline-level="2">Q5. Why do greedy algorithms fail in some cases?</text:h>
      <text:p text:style-name="Text_20_body">Because choosing the locally optimal solution may not always produce the globally optimal solution.</text:p>
      <text:h text:style-name="Heading_20_2" text:outline-level="2">Q6. Give examples where greedy algorithms fail.</text:h>
      <text:list text:style-name="L1">
        <text:list-item>
          <text:p text:style-name="P1">Coin Change Problem</text:p>
        </text:list-item>
        <text:list-item>
          <text:p text:style-name="P1">0/1 Knapsack Problem</text:p>
        </text:list-item>
      </text:list>
      <text:h text:style-name="Heading_20_2" text:outline-level="2">Q7. What are the applications of greedy algorithms?</text:h>
      <text:list text:style-name="L2">
        <text:list-item>
          <text:p text:style-name="P2">Fractional Knapsack</text:p>
        </text:list-item>
        <text:list-item>
          <text:p text:style-name="P2">Job Scheduling</text:p>
        </text:list-item>
      </text:list>
      <text:p text:style-name="Horizontal_20_Line"/>
      <text:h text:style-name="Heading_20_1" text:outline-level="1"><text:soft-page-break/>Fractional Knapsack Problem</text:h>
      <text:h text:style-name="Heading_20_2" text:outline-level="2">Q8. What is the Fractional Knapsack Problem?</text:h>
      <text:p text:style-name="Text_20_body">It is a problem where items can be taken fractionally to maximize profit without exceeding capacity.</text:p>
      <text:h text:style-name="Heading_20_2" text:outline-level="2">Q9. Which greedy strategy gives the best result in Fractional Knapsack?</text:h>
      <text:p text:style-name="Text_20_body">Selecting items based on the profit/weight ratio gives the best result.</text:p>
      <text:h text:style-name="Heading_20_2" text:outline-level="2">Q10. Can items be divided in Fractional Knapsack?</text:h>
      <text:p text:style-name="Text_20_body">Yes, items can be taken partially or fractionally.</text:p>
      <text:p text:style-name="Horizontal_20_Line"/>
      <text:h text:style-name="Heading_20_1" text:outline-level="1">Minimum Spanning Tree (MST)</text:h>
      <text:h text:style-name="Heading_20_2" text:outline-level="2">Q11. What is a spanning tree?</text:h>
      <text:p text:style-name="Text_20_body">A spanning tree is a subgraph that contains all vertices of a graph and forms a tree.</text:p>
      <text:h text:style-name="Heading_20_2" text:outline-level="2">Q12. What is a Minimum Spanning Tree?</text:h>
      <text:p text:style-name="Text_20_body">A Minimum Spanning Tree is a spanning tree with the minimum total edge cost.</text:p>
      <text:h text:style-name="Heading_20_2" text:outline-level="2">Q13. Name two MST algorithms.</text:h>
      <text:list text:style-name="L3">
        <text:list-item>
          <text:p text:style-name="P3">Kruskal’s Algorithm</text:p>
        </text:list-item>
        <text:list-item>
          <text:p text:style-name="P3">Prim’s Algorithm</text:p>
        </text:list-item>
      </text:list>
      <text:h text:style-name="Heading_20_2" text:outline-level="2">Q14. How many edges does an MST contain?</text:h>
      <text:p text:style-name="Text_20_body">An MST contains n−1 edges where n is the number of vertices.</text:p>
      <text:p text:style-name="Horizontal_20_Line"/>
      <text:h text:style-name="Heading_20_1" text:outline-level="1"><text:soft-page-break/>Kruskal’s Algorithm</text:h>
      <text:h text:style-name="Heading_20_2" text:outline-level="2">Q15. What is Kruskal’s Algorithm?</text:h>
      <text:p text:style-name="Text_20_body">Kruskal’s Algorithm is a greedy algorithm used to find the Minimum Spanning Tree by selecting minimum cost edges without forming cycles.</text:p>
      <text:h text:style-name="Heading_20_2" text:outline-level="2">Q16. What data structure is commonly used in Kruskal’s Algorithm?</text:h>
      <text:p text:style-name="Text_20_body">Priority Queue is commonly used.</text:p>
      <text:h text:style-name="Heading_20_2" text:outline-level="2">Q17. What happens if an edge forms a cycle in Kruskal’s Algorithm?</text:h>
      <text:p text:style-name="Text_20_body">The edge is rejected.</text:p>
      <text:h text:style-name="Heading_20_2" text:outline-level="2">Q18. Why is Kruskal’s Algorithm called greedy?</text:h>
      <text:p text:style-name="Text_20_body">Because it always selects the minimum cost edge available.</text:p>
      <text:p text:style-name="Horizontal_20_Line"/>
      <text:h text:style-name="Heading_20_1" text:outline-level="1">Single Source Shortest Path (SSSP)</text:h>
      <text:h text:style-name="Heading_20_2" text:outline-level="2">Q19. What is the shortest path problem?</text:h>
      <text:p text:style-name="Text_20_body">It is the problem of finding the minimum cost path between nodes in a graph.</text:p>
      <text:h text:style-name="Heading_20_2" text:outline-level="2">Q20. What is the cost of a path in a weighted graph?</text:h>
      <text:p text:style-name="Text_20_body">The cost is the sum of all edge weights along the path.</text:p>
      <text:h text:style-name="Heading_20_2" text:outline-level="2">Q21. Name the variations of shortest path problems.</text:h>
      <text:list text:style-name="L4">
        <text:list-item>
          <text:p text:style-name="P4">Single-pair shortest path</text:p>
        </text:list-item>
        <text:list-item>
          <text:p text:style-name="P4">Single-source shortest path</text:p>
        </text:list-item>
        <text:list-item>
          <text:p text:style-name="P4">Single-destination shortest path</text:p>
        </text:list-item>
        <text:list-item>
          <text:p text:style-name="P4">All-pair shortest path</text:p>
        </text:list-item>
      </text:list>
      <text:p text:style-name="Horizontal_20_Line"/>
      <text:h text:style-name="Heading_20_1" text:outline-level="1"><text:soft-page-break/>Dijkstra’s Algorithm</text:h>
      <text:h text:style-name="Heading_20_2" text:outline-level="2">Q22. What is Dijkstra’s Algorithm?</text:h>
      <text:p text:style-name="Text_20_body">It is a greedy algorithm used to find the shortest path from a source node to all other nodes.</text:p>
      <text:h text:style-name="Heading_20_2" text:outline-level="2">Q23. Does Dijkstra’s Algorithm work with negative edges?</text:h>
      <text:p text:style-name="Text_20_body">No, it does not work with negative edge weights.</text:p>
      <text:h text:style-name="Heading_20_2" text:outline-level="2">Q24. Which approach does Dijkstra’s Algorithm use?</text:h>
      <text:p text:style-name="Text_20_body">Greedy approach.</text:p>
      <text:h text:style-name="Heading_20_2" text:outline-level="2">Q25. What is relaxation in Dijkstra’s Algorithm?</text:h>
      <text:p text:style-name="Text_20_body">Relaxation updates the shortest distance if a shorter path is found.</text:p>
      <text:p text:style-name="Text_20_body">d(u)+c(u,v)&lt;d(v)</text:p>
      <text:p text:style-name="Text_20_body">Then:</text:p>
      <text:p text:style-name="Text_20_body">d(v)=d(u)+c(u,v)</text:p>
      <text:h text:style-name="Heading_20_2" text:outline-level="2">Q26. What is the initial distance of the source node in Dijkstra’s Algorithm?</text:h>
      <text:p text:style-name="Text_20_body">The initial distance of the source node is 0.</text:p>
      <text:h text:style-name="Heading_20_2" text:outline-level="2">Q27. What is the initial distance of other nodes in Dijkstra’s Algorithm?</text:h>
      <text:p text:style-name="Text_20_body">Infinity (INF).</text:p>
      <text:p text:style-name="Horizontal_20_Line"/>
      <text:h text:style-name="Heading_20_1" text:outline-level="1">Bellman-Ford Algorithm</text:h>
      <text:h text:style-name="Heading_20_2" text:outline-level="2">Q28. What is Bellman-Ford Algorithm?</text:h>
      <text:p text:style-name="Text_20_body">Bellman-Ford Algorithm finds shortest paths in graphs with negative edge weights.</text:p>
      <text:h text:style-name="Heading_20_2" text:outline-level="2">Q29. What is the main operation in Bellman-Ford Algorithm?</text:h>
      <text:p text:style-name="Text_20_body">Relaxation of edges.</text:p>
      <text:h text:style-name="Heading_20_2" text:outline-level="2"><text:soft-page-break/>Q30. How many times are edges relaxed in Bellman-Ford Algorithm?</text:h>
      <text:p text:style-name="Text_20_body">V−1 times, where V is the number of vertices.</text:p>
      <text:h text:style-name="Heading_20_2" text:outline-level="2">Q31. How can a negative weight cycle be detected?</text:h>
      <text:p text:style-name="Text_20_body">If any distance changes in the V-th iteration, then a negative weight cycle exists.</text:p>
      <text:h text:style-name="Heading_20_2" text:outline-level="2">Q32. Does Bellman-Ford work with negative edges?</text:h>
      <text:p text:style-name="Text_20_body">Yes.</text:p>
      <text:p text:style-name="Horizontal_20_Line"/>
      <text:h text:style-name="Heading_20_1" text:outline-level="1">Topological Sort</text:h>
      <text:h text:style-name="Heading_20_2" text:outline-level="2">Q33. What is Topological Sorting?</text:h>
      <text:p text:style-name="Text_20_body">It is a linear ordering of vertices in a DAG where u appears before v if there is an edge u→v.</text:p>
      <text:h text:style-name="Heading_20_2" text:outline-level="2">Q34. On which graph is topological sorting possible?</text:h>
      <text:p text:style-name="Text_20_body">Directed Acyclic Graph (DAG).</text:p>
      <text:h text:style-name="Heading_20_2" text:outline-level="2">Q35. Why is topological sorting impossible in cyclic graphs?</text:h>
      <text:p text:style-name="Text_20_body">Because dependency ordering cannot be satisfied in cycles.</text:p>
      <text:h text:style-name="Heading_20_2" text:outline-level="2">Q36. Give applications of topological sorting.</text:h>
      <text:list text:style-name="L5">
        <text:list-item>
          <text:p text:style-name="P5">Task scheduling</text:p>
        </text:list-item>
        <text:list-item>
          <text:p text:style-name="P5">Course prerequisite ordering</text:p>
        </text:list-item>
        <text:list-item>
          <text:p text:style-name="P5">Build systems</text:p>
        </text:list-item>
      </text:list>
      <text:p text:style-name="Horizontal_20_Line"/>
      <text:h text:style-name="Heading_20_1" text:outline-level="1">Kahn’s Algorithm</text:h>
      <text:h text:style-name="Heading_20_2" text:outline-level="2">Q37. What is Kahn’s Algorithm?</text:h>
      <text:p text:style-name="Text_20_body">Kahn’s Algorithm is a BFS-based algorithm for topological sorting.</text:p>
      <text:h text:style-name="Heading_20_2" text:outline-level="2"><text:soft-page-break/>Q38. Which vertices are inserted into the queue first in Kahn’s Algorithm?</text:h>
      <text:p text:style-name="Text_20_body">Vertices with indegree 0.</text:p>
      <text:h text:style-name="Heading_20_2" text:outline-level="2">Q39. What is indegree?</text:h>
      <text:p text:style-name="Text_20_body">Indegree is the number of incoming edges of a vertex.</text:p>
      <text:p text:style-name="Horizontal_20_Line"/>
      <text:h text:style-name="Heading_20_1" text:outline-level="1">DFS Based Topological Sort</text:h>
      <text:h text:style-name="Heading_20_2" text:outline-level="2">Q40. What data structure is used in DFS-based topological sorting?</text:h>
      <text:p text:style-name="Text_20_body">Stack.</text:p>
      <text:h text:style-name="Heading_20_2" text:outline-level="2">Q41. When is a node pushed into the stack in DFS topological sort?</text:h>
      <text:p text:style-name="Text_20_body">After visiting all its adjacent vertices.</text:p>
      <text:p text:style-name="Horizontal_20_Line"/>
      <text:h text:style-name="Heading_20_1" text:outline-level="1">Backtracking</text:h>
      <text:h text:style-name="Heading_20_2" text:outline-level="2">Q42. What is Backtracking?</text:h>
      <text:p text:style-name="Text_20_body">Backtracking is a technique where solutions are built incrementally and invalid solutions are abandoned.</text:p>
      <text:h text:style-name="Heading_20_2" text:outline-level="2">Q43. What happens when backtracking reaches a dead end?</text:h>
      <text:p text:style-name="Text_20_body">The algorithm returns to the previous state and tries another path.</text:p>
      <text:h text:style-name="Heading_20_2" text:outline-level="2">Q44. Name some applications of backtracking.</text:h>
      <text:list text:style-name="L6">
        <text:list-item>
          <text:p text:style-name="P6">Sudoku</text:p>
        </text:list-item>
        <text:list-item>
          <text:p text:style-name="P6">N Queens</text:p>
        </text:list-item>
        <text:list-item>
          <text:p text:style-name="P6">Graph Coloring</text:p>
        </text:list-item>
        <text:list-item>
          <text:p text:style-name="P6">Puzzle solving</text:p>
        </text:list-item>
      </text:list>
      <text:h text:style-name="Heading_20_2" text:outline-level="2"><text:soft-page-break/>Q45. What are the main steps of backtracking?</text:h>
      <text:list text:style-name="L7">
        <text:list-item>
          <text:p text:style-name="P7">Choose</text:p>
        </text:list-item>
        <text:list-item>
          <text:p text:style-name="P7">Explore</text:p>
        </text:list-item>
        <text:list-item>
          <text:p text:style-name="P7">Check validity</text:p>
        </text:list-item>
        <text:list-item>
          <text:p text:style-name="P7">Backtrack</text:p>
        </text:list-item>
        <text:list-item>
          <text:p text:style-name="P7">Repeat</text:p>
        </text:list-item>
      </text:list>
      <text:p text:style-name="Horizontal_20_Line"/>
      <text:h text:style-name="Heading_20_1" text:outline-level="1">Graph Coloring Problem</text:h>
      <text:h text:style-name="Heading_20_2" text:outline-level="2">Q46. What is graph coloring?</text:h>
      <text:p text:style-name="Text_20_body">Assigning colors to graph vertices so that adjacent vertices do not share the same color.</text:p>
      <text:h text:style-name="Heading_20_2" text:outline-level="2">Q47. What is m-coloring?</text:h>
      <text:p text:style-name="Text_20_body">Coloring a graph using at most m colors.</text:p>
      <text:h text:style-name="Heading_20_2" text:outline-level="2">Q48. What is Chromatic Number?</text:h>
      <text:p text:style-name="Text_20_body">The minimum number of colors needed to color a graph.</text:p>
      <text:h text:style-name="Heading_20_2" text:outline-level="2">Q49. Give applications of graph coloring.</text:h>
      <text:list text:style-name="L8">
        <text:list-item>
          <text:p text:style-name="P8">Map coloring</text:p>
        </text:list-item>
        <text:list-item>
          <text:p text:style-name="P8">Timetable scheduling</text:p>
        </text:list-item>
      </text:list>
      <text:p text:style-name="Horizontal_20_Line"/>
      <text:h text:style-name="Heading_20_1" text:outline-level="1">N Queens Problem</text:h>
      <text:h text:style-name="Heading_20_2" text:outline-level="2">Q50. What is the N Queens Problem?</text:h>
      <text:p text:style-name="Text_20_body">It is the problem of placing N queens on an N×N chessboard so that no two queens attack each other.</text:p>
      <text:h text:style-name="Heading_20_2" text:outline-level="2">Q51. Which positions must queens avoid?</text:h>
      <text:list text:style-name="L9">
        <text:list-item>
          <text:p text:style-name="P9">Same row</text:p>
        </text:list-item>
        <text:list-item>
          <text:p text:style-name="P9">Same column</text:p>
        </text:list-item>
        <text:list-item>
          <text:p text:style-name="P9"><text:soft-page-break/>Same diagonal</text:p>
        </text:list-item>
      </text:list>
      <text:h text:style-name="Heading_20_2" text:outline-level="2">Q52. Which technique is used to solve the N Queens Problem?</text:h>
      <text:p text:style-name="Text_20_body">Backtracking.</text:p>
      <text:p text:style-name="Horizontal_20_Line"/>
      <text:h text:style-name="Heading_20_1" text:outline-level="1">Branch and Bound</text:h>
      <text:h text:style-name="Heading_20_2" text:outline-level="2">Q53. What is Branch and Bound?</text:h>
      <text:p text:style-name="Text_20_body">It is an optimization technique used to find optimal solutions by branching and pruning.</text:p>
      <text:h text:style-name="Heading_20_2" text:outline-level="2">Q54. What is branching?</text:h>
      <text:p text:style-name="Text_20_body">Dividing a problem into smaller subproblems.</text:p>
      <text:h text:style-name="Heading_20_2" text:outline-level="2">Q55. What is pruning?</text:h>
      <text:p text:style-name="Text_20_body">Eliminating branches that cannot produce better solutions.</text:p>
      <text:h text:style-name="Heading_20_2" text:outline-level="2">Q56. What is bounding?</text:h>
      <text:p text:style-name="Text_20_body">Computing upper or lower limits for subproblems.</text:p>
      <text:h text:style-name="Heading_20_2" text:outline-level="2">Q57. Which search strategy is used in FIFO Branch and Bound?</text:h>
      <text:p text:style-name="Text_20_body">Breadth First Search (BFS).</text:p>
      <text:p text:style-name="Horizontal_20_Line"/>
      <text:h text:style-name="Heading_20_1" text:outline-level="1">Approximation Algorithm</text:h>
      <text:h text:style-name="Heading_20_2" text:outline-level="2">Q58. What is an approximation algorithm?</text:h>
      <text:p text:style-name="Text_20_body">An algorithm that finds near-optimal solutions for NP-hard problems.</text:p>
      <text:h text:style-name="Heading_20_2" text:outline-level="2">Q59. Why are approximation algorithms needed?</text:h>
      <text:p text:style-name="Text_20_body">Because exact polynomial-time solutions are not available for NP-hard problems.</text:p>
      <text:h text:style-name="Heading_20_2" text:outline-level="2"><text:soft-page-break/>Q60. What is an approximate solution?</text:h>
      <text:p text:style-name="Text_20_body">A feasible solution close to the optimal solution.</text:p>
      <text:p text:style-name="Horizontal_20_Line"/>
      <text:h text:style-name="Heading_20_1" text:outline-level="1">Traveling Salesman Problem (TSP)</text:h>
      <text:h text:style-name="Heading_20_2" text:outline-level="2">Q61. What is the Traveling Salesman Problem?</text:h>
      <text:p text:style-name="Text_20_body">The problem of visiting all cities exactly once and returning to the starting city with minimum cost.</text:p>
      <text:h text:style-name="Heading_20_2" text:outline-level="2">Q62. What type of problem is TSP?</text:h>
      <text:p text:style-name="Text_20_body">NP-hard problem.</text:p>
      <text:h text:style-name="Heading_20_2" text:outline-level="2">Q63. What is Triangle Inequality?</text:h>
      <text:p text:style-name="Text_20_body">d(A,C)\le d(A,B)+d(B,C)</text:p>
      <text:p text:style-name="Text_20_body">The direct path should not cost more than an indirect path.</text:p>
      <text:h text:style-name="Heading_20_2" text:outline-level="2">Q64. Which tree is used in TSP approximation?</text:h>
      <text:p text:style-name="Text_20_body">Minimum Spanning Tree (MST).</text:p>
      <text:p text:style-name="Horizontal_20_Line"/>
      <text:h text:style-name="Heading_20_1" text:outline-level="1">Vertex Cover Problem</text:h>
      <text:h text:style-name="Heading_20_2" text:outline-level="2">Q65. What is a vertex cover?</text:h>
      <text:p text:style-name="Text_20_body">A subset of vertices such that every edge has at least one endpoint in the subset.</text:p>
      <text:h text:style-name="Heading_20_2" text:outline-level="2">Q66. What is the goal of the Vertex Cover Problem?</text:h>
      <text:p text:style-name="Text_20_body">To find the minimum size vertex cover.</text:p>
      <text:h text:style-name="Heading_20_2" text:outline-level="2">Q67. Which graph is used in Vertex Cover Problem?</text:h>
      <text:p text:style-name="Text_20_body">Undirected graph.</text:p>
      <text:h text:style-name="Heading_20_2" text:outline-level="2">Q68. Give a real-life application of Vertex Cover.</text:h>
      <text:p text:style-name="Text_20_body">Traffic camera placement.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03:53:34.479555851</meta:creation-date>
    <dc:date>2026-05-10T03:58:27.590748786</dc:date>
    <meta:editing-duration>PT4M53S</meta:editing-duration>
    <meta:editing-cycles>1</meta:editing-cycles>
    <meta:document-statistic meta:table-count="0" meta:image-count="0" meta:object-count="0" meta:page-count="10" meta:paragraph-count="176" meta:word-count="1224" meta:character-count="7450" meta:non-whitespace-character-count="6429"/>
    <meta:generator>LibreOffice/26.2.3.2$Linux_X86_64 LibreOffice_project/70e089b17412e4cb7773e41413306b17a2328c34</meta:generator>
  </office:meta>
</office:document-meta>
</file>