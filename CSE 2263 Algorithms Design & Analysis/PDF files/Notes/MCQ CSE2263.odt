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CQ from All Topics (According to Slides)</text:h>
      <text:h text:style-name="Heading_20_1" text:outline-level="1">Greedy Technique</text:h>
      <text:h text:style-name="Heading_20_2" text:outline-level="2">Q1. What is the main idea of a greedy algorithm?</text:h>
      <text:p text:style-name="Text_20_body">A) Divide problem into subproblems<text:line-break/>B) Choose the best option at each step<text:line-break/>C) Explore all possibilities<text:line-break/>D) Use recursion only</text:p>
      <text:p text:style-name="Text_20_body"><text:span text:style-name="Strong_20_Emphasis">Answer:</text:span> B) Choose the best option at each step</text:p>
      <text:p text:style-name="Horizontal_20_Line"/>
      <text:h text:style-name="Heading_20_2" text:outline-level="2">Q2. Greedy algorithms are mainly used for —</text:h>
      <text:p text:style-name="Text_20_body">A) Sorting problems<text:line-break/>B) Searching problems<text:line-break/>C) Optimization problems<text:line-break/>D) Traversal problems</text:p>
      <text:p text:style-name="Text_20_body"><text:span text:style-name="Strong_20_Emphasis">Answer:</text:span> C) Optimization problems</text:p>
      <text:p text:style-name="Horizontal_20_Line"/>
      <text:h text:style-name="Heading_20_2" text:outline-level="2">Q3. Which property is necessary for greedy algorithms?</text:h>
      <text:p text:style-name="Text_20_body">A) Divide and Conquer<text:line-break/>B) Dynamic Allocation<text:line-break/>C) Greedy Choice Property<text:line-break/>D) Binary Property</text:p>
      <text:p text:style-name="Text_20_body"><text:span text:style-name="Strong_20_Emphasis">Answer:</text:span> C) Greedy Choice Property</text:p>
      <text:p text:style-name="Horizontal_20_Line"/>
      <text:h text:style-name="Heading_20_2" text:outline-level="2">Q4. Which problem may fail using greedy approach?</text:h>
      <text:p text:style-name="Text_20_body">A) Fractional Knapsack<text:line-break/>B) Coin Change<text:line-break/>C) Job Scheduling<text:line-break/>D) MST</text:p>
      <text:p text:style-name="Text_20_body"><text:span text:style-name="Strong_20_Emphasis">Answer:</text:span> B) Coin Change</text:p>
      <text:p text:style-name="Horizontal_20_Line"><text:soft-page-break/></text:p>
      <text:h text:style-name="Heading_20_1" text:outline-level="1">Fractional Knapsack</text:h>
      <text:h text:style-name="Heading_20_2" text:outline-level="2">Q5. In Fractional Knapsack, items can be —</text:h>
      <text:p text:style-name="Text_20_body">A) Taken only once<text:line-break/>B) Divided into fractions<text:line-break/>C) Ignored completely<text:line-break/>D) Taken twice</text:p>
      <text:p text:style-name="Text_20_body"><text:span text:style-name="Strong_20_Emphasis">Answer:</text:span> B) Divided into fractions</text:p>
      <text:p text:style-name="Horizontal_20_Line"/>
      <text:h text:style-name="Heading_20_2" text:outline-level="2">Q6. Which method gives the best result in Fractional Knapsack?</text:h>
      <text:p text:style-name="Text_20_body">A) Smaller weight first<text:line-break/>B) Larger weight first<text:line-break/>C) Profit/Weight ratio<text:line-break/>D) Random selection</text:p>
      <text:p text:style-name="Text_20_body"><text:span text:style-name="Strong_20_Emphasis">Answer:</text:span> C) Profit/Weight ratio</text:p>
      <text:p text:style-name="Horizontal_20_Line"/>
      <text:h text:style-name="Heading_20_1" text:outline-level="1">Minimum Spanning Tree</text:h>
      <text:h text:style-name="Heading_20_2" text:outline-level="2">Q7. A spanning tree must contain —</text:h>
      <text:p text:style-name="Text_20_body">A) All edges<text:line-break/>B) All vertices<text:line-break/>C) Cycles<text:line-break/>D) Directed edges</text:p>
      <text:p text:style-name="Text_20_body"><text:span text:style-name="Strong_20_Emphasis">Answer:</text:span> B) All vertices</text:p>
      <text:p text:style-name="Horizontal_20_Line"/>
      <text:h text:style-name="Heading_20_2" text:outline-level="2">Q8. Minimum Spanning Tree contains —</text:h>
      <text:p text:style-name="Text_20_body">A) Maximum cost<text:line-break/>B) Minimum cost<text:line-break/>C) Maximum vertices<text:line-break/>D) Duplicate edges</text:p>
      <text:p text:style-name="Text_20_body"><text:soft-page-break/><text:span text:style-name="Strong_20_Emphasis">Answer:</text:span> B) Minimum cost</text:p>
      <text:p text:style-name="Horizontal_20_Line"/>
      <text:h text:style-name="Heading_20_2" text:outline-level="2">Q9. Which algorithm is used for MST?</text:h>
      <text:p text:style-name="Text_20_body">A) Dijkstra<text:line-break/>B) Bellman-Ford<text:line-break/>C) Kruskal<text:line-break/>D) DFS</text:p>
      <text:p text:style-name="Text_20_body"><text:span text:style-name="Strong_20_Emphasis">Answer:</text:span> C) Kruskal</text:p>
      <text:p text:style-name="Horizontal_20_Line"/>
      <text:h text:style-name="Heading_20_2" text:outline-level="2">Q10. An MST of a graph with n vertices contains —</text:h>
      <text:p text:style-name="Text_20_body">A) n edges<text:line-break/>B) n+1 edges<text:line-break/>C) n−1 edges<text:line-break/>D) n² edges</text:p>
      <text:p text:style-name="Text_20_body"><text:span text:style-name="Strong_20_Emphasis">Answer:</text:span> C) n−1 edges</text:p>
      <text:p text:style-name="Horizontal_20_Line"/>
      <text:h text:style-name="Heading_20_1" text:outline-level="1">Kruskal’s Algorithm</text:h>
      <text:h text:style-name="Heading_20_2" text:outline-level="2">Q11. Kruskal’s Algorithm is based on —</text:h>
      <text:p text:style-name="Text_20_body">A) Dynamic Programming<text:line-break/>B) Greedy Method<text:line-break/>C) Divide and Conquer<text:line-break/>D) BFS</text:p>
      <text:p text:style-name="Text_20_body"><text:span text:style-name="Strong_20_Emphasis">Answer:</text:span> B) Greedy Method</text:p>
      <text:p text:style-name="Horizontal_20_Line"/>
      <text:h text:style-name="Heading_20_2" text:outline-level="2">Q12. Kruskal’s Algorithm selects —</text:h>
      <text:p text:style-name="Text_20_body">A) Maximum edge first<text:line-break/>B) Random edge first<text:line-break/>C) Minimum edge first<text:line-break/>D) Negative edge first</text:p>
      <text:p text:style-name="Text_20_body"><text:span text:style-name="Strong_20_Emphasis">Answer:</text:span> C) Minimum edge first</text:p>
      <text:p text:style-name="Horizontal_20_Line"><text:soft-page-break/></text:p>
      <text:h text:style-name="Heading_20_2" text:outline-level="2">Q13. What happens if an edge forms a cycle in Kruskal’s Algorithm?</text:h>
      <text:p text:style-name="Text_20_body">A) Added<text:line-break/>B) Multiplied<text:line-break/>C) Rejected<text:line-break/>D) Reversed</text:p>
      <text:p text:style-name="Text_20_body"><text:span text:style-name="Strong_20_Emphasis">Answer:</text:span> C) Rejected</text:p>
      <text:p text:style-name="Horizontal_20_Line"/>
      <text:h text:style-name="Heading_20_2" text:outline-level="2">Q14. Which data structure is commonly used in Kruskal’s Algorithm?</text:h>
      <text:p text:style-name="Text_20_body">A) Stack<text:line-break/>B) Queue<text:line-break/>C) Priority Queue<text:line-break/>D) Array</text:p>
      <text:p text:style-name="Text_20_body"><text:span text:style-name="Strong_20_Emphasis">Answer:</text:span> C) Priority Queue</text:p>
      <text:p text:style-name="Horizontal_20_Line"/>
      <text:h text:style-name="Heading_20_1" text:outline-level="1">Single Source Shortest Path</text:h>
      <text:h text:style-name="Heading_20_2" text:outline-level="2">Q15. SSSP stands for —</text:h>
      <text:p text:style-name="Text_20_body">A) Single Source Smallest Path<text:line-break/>B) Single Source Shortest Path<text:line-break/>C) Smallest Source Shortest Path<text:line-break/>D) Simple Source Shortest Path</text:p>
      <text:p text:style-name="Text_20_body"><text:span text:style-name="Strong_20_Emphasis">Answer:</text:span> B) Single Source Shortest Path</text:p>
      <text:p text:style-name="Horizontal_20_Line"/>
      <text:h text:style-name="Heading_20_2" text:outline-level="2">Q16. In weighted graphs, path cost is calculated using —</text:h>
      <text:p text:style-name="Text_20_body">A) Number of vertices<text:line-break/>B) Number of paths<text:line-break/>C) Sum of edge weights<text:line-break/>D) Multiplication of nodes</text:p>
      <text:p text:style-name="Text_20_body"><text:soft-page-break/><text:span text:style-name="Strong_20_Emphasis">Answer:</text:span> C) Sum of edge weights</text:p>
      <text:p text:style-name="Horizontal_20_Line"/>
      <text:h text:style-name="Heading_20_1" text:outline-level="1">Dijkstra’s Algorithm</text:h>
      <text:h text:style-name="Heading_20_2" text:outline-level="2">Q17. Dijkstra’s Algorithm is used for —</text:h>
      <text:p text:style-name="Text_20_body">A) Sorting<text:line-break/>B) MST<text:line-break/>C) Shortest Path<text:line-break/>D) Graph Coloring</text:p>
      <text:p text:style-name="Text_20_body"><text:span text:style-name="Strong_20_Emphasis">Answer:</text:span> C) Shortest Path</text:p>
      <text:p text:style-name="Horizontal_20_Line"/>
      <text:h text:style-name="Heading_20_2" text:outline-level="2">Q18. Dijkstra’s Algorithm follows —</text:h>
      <text:p text:style-name="Text_20_body">A) BFS<text:line-break/>B) DFS<text:line-break/>C) Greedy Approach<text:line-break/>D) Divide and Conquer</text:p>
      <text:p text:style-name="Text_20_body"><text:span text:style-name="Strong_20_Emphasis">Answer:</text:span> C) Greedy Approach</text:p>
      <text:p text:style-name="Horizontal_20_Line"/>
      <text:h text:style-name="Heading_20_2" text:outline-level="2">Q19. Dijkstra’s Algorithm does not work with —</text:h>
      <text:p text:style-name="Text_20_body">A) Positive edges<text:line-break/>B) Weighted graphs<text:line-break/>C) Negative edges<text:line-break/>D) Directed graphs</text:p>
      <text:p text:style-name="Text_20_body"><text:span text:style-name="Strong_20_Emphasis">Answer:</text:span> C) Negative edges</text:p>
      <text:p text:style-name="Horizontal_20_Line"/>
      <text:h text:style-name="Heading_20_2" text:outline-level="2">Q20. Initial distance of source node in Dijkstra is —</text:h>
      <text:p text:style-name="Text_20_body">A) ∞<text:line-break/>B) 1<text:line-break/>C) −1<text:line-break/>D) 0</text:p>
      <text:p text:style-name="Text_20_body"><text:span text:style-name="Strong_20_Emphasis">Answer:</text:span> D) 0</text:p>
      <text:p text:style-name="Horizontal_20_Line"><text:soft-page-break/></text:p>
      <text:h text:style-name="Heading_20_2" text:outline-level="2">Q21. Initial distance of other nodes in Dijkstra is —</text:h>
      <text:p text:style-name="Text_20_body">A) 0<text:line-break/>B) 1<text:line-break/>C) ∞<text:line-break/>D) −∞</text:p>
      <text:p text:style-name="Text_20_body"><text:span text:style-name="Strong_20_Emphasis">Answer:</text:span> C) ∞</text:p>
      <text:p text:style-name="Horizontal_20_Line"/>
      <text:h text:style-name="Heading_20_2" text:outline-level="2">Q22. What is the process of updating shortest distance called?</text:h>
      <text:p text:style-name="Text_20_body">A) Traversal<text:line-break/>B) Relaxation<text:line-break/>C) Recursion<text:line-break/>D) Rotation</text:p>
      <text:p text:style-name="Text_20_body"><text:span text:style-name="Strong_20_Emphasis">Answer:</text:span> B) Relaxation</text:p>
      <text:p text:style-name="Horizontal_20_Line"/>
      <text:h text:style-name="Heading_20_1" text:outline-level="1">Bellman-Ford Algorithm</text:h>
      <text:h text:style-name="Heading_20_2" text:outline-level="2">Q23. Bellman-Ford Algorithm works with —</text:h>
      <text:p text:style-name="Text_20_body">A) Only positive edges<text:line-break/>B) Negative edge weights<text:line-break/>C) Unweighted graphs<text:line-break/>D) Cyclic trees only</text:p>
      <text:p text:style-name="Text_20_body"><text:span text:style-name="Strong_20_Emphasis">Answer:</text:span> B) Negative edge weights</text:p>
      <text:p text:style-name="Horizontal_20_Line"/>
      <text:h text:style-name="Heading_20_2" text:outline-level="2">Q24. Bellman-Ford Algorithm relaxes edges —</text:h>
      <text:p text:style-name="Text_20_body">A) Once<text:line-break/>B) Twice<text:line-break/>C) V−1 times<text:line-break/>D) V² times</text:p>
      <text:p text:style-name="Text_20_body"><text:span text:style-name="Strong_20_Emphasis">Answer:</text:span> C) V−1 times</text:p>
      <text:p text:style-name="Horizontal_20_Line"/>
      <text:h text:style-name="Heading_20_2" text:outline-level="2"><text:soft-page-break/>Q25. Bellman-Ford detects —</text:h>
      <text:p text:style-name="Text_20_body">A) MST<text:line-break/>B) Topological order<text:line-break/>C) Negative weight cycle<text:line-break/>D) Hamiltonian path</text:p>
      <text:p text:style-name="Text_20_body"><text:span text:style-name="Strong_20_Emphasis">Answer:</text:span> C) Negative weight cycle</text:p>
      <text:p text:style-name="Horizontal_20_Line"/>
      <text:h text:style-name="Heading_20_2" text:outline-level="2">Q26. A change in the V-th iteration indicates —</text:h>
      <text:p text:style-name="Text_20_body">A) BFS completion<text:line-break/>B) MST formation<text:line-break/>C) Negative cycle<text:line-break/>D) Graph coloring</text:p>
      <text:p text:style-name="Text_20_body"><text:span text:style-name="Strong_20_Emphasis">Answer:</text:span> C) Negative cycle</text:p>
      <text:p text:style-name="Horizontal_20_Line"/>
      <text:h text:style-name="Heading_20_1" text:outline-level="1">Topological Sort</text:h>
      <text:h text:style-name="Heading_20_2" text:outline-level="2">Q27. Topological sorting is possible only for —</text:h>
      <text:p text:style-name="Text_20_body">A) Undirected Graph<text:line-break/>B) Cyclic Graph<text:line-break/>C) DAG<text:line-break/>D) Weighted Graph</text:p>
      <text:p text:style-name="Text_20_body"><text:span text:style-name="Strong_20_Emphasis">Answer:</text:span> C) DAG</text:p>
      <text:p text:style-name="Horizontal_20_Line"/>
      <text:h text:style-name="Heading_20_2" text:outline-level="2">Q28. DAG stands for —</text:h>
      <text:p text:style-name="Text_20_body">A) Directed Acyclic Graph<text:line-break/>B) Double Acyclic Graph<text:line-break/>C) Directed Adjacent Graph<text:line-break/>D) Dynamic Acyclic Graph</text:p>
      <text:p text:style-name="Text_20_body"><text:span text:style-name="Strong_20_Emphasis">Answer:</text:span> A) Directed Acyclic Graph</text:p>
      <text:p text:style-name="Horizontal_20_Line"/>
      <text:h text:style-name="Heading_20_2" text:outline-level="2"><text:soft-page-break/>Q29. Topological sorting represents —</text:h>
      <text:p text:style-name="Text_20_body">A) Weight ordering<text:line-break/>B) Dependency ordering<text:line-break/>C) Color ordering<text:line-break/>D) Tree ordering</text:p>
      <text:p text:style-name="Text_20_body"><text:span text:style-name="Strong_20_Emphasis">Answer:</text:span> B) Dependency ordering</text:p>
      <text:p text:style-name="Horizontal_20_Line"/>
      <text:h text:style-name="Heading_20_2" text:outline-level="2">Q30. Which graph cannot have topological ordering?</text:h>
      <text:p text:style-name="Text_20_body">A) DAG<text:line-break/>B) Directed Graph<text:line-break/>C) Cyclic Graph<text:line-break/>D) Tree</text:p>
      <text:p text:style-name="Text_20_body"><text:span text:style-name="Strong_20_Emphasis">Answer:</text:span> C) Cyclic Graph</text:p>
      <text:p text:style-name="Horizontal_20_Line"/>
      <text:h text:style-name="Heading_20_1" text:outline-level="1">Kahn’s Algorithm</text:h>
      <text:h text:style-name="Heading_20_2" text:outline-level="2">Q31. Kahn’s Algorithm is based on —</text:h>
      <text:p text:style-name="Text_20_body">A) DFS<text:line-break/>B) BFS<text:line-break/>C) DP<text:line-break/>D) Greedy</text:p>
      <text:p text:style-name="Text_20_body"><text:span text:style-name="Strong_20_Emphasis">Answer:</text:span> B) BFS</text:p>
      <text:p text:style-name="Horizontal_20_Line"/>
      <text:h text:style-name="Heading_20_2" text:outline-level="2">Q32. Kahn’s Algorithm starts with vertices having indegree —</text:h>
      <text:p text:style-name="Text_20_body">A) 1<text:line-break/>B) −1<text:line-break/>C) 0<text:line-break/>D) 2</text:p>
      <text:p text:style-name="Text_20_body"><text:span text:style-name="Strong_20_Emphasis">Answer:</text:span> C) 0</text:p>
      <text:p text:style-name="Horizontal_20_Line"/>
      <text:h text:style-name="Heading_20_2" text:outline-level="2"><text:soft-page-break/>Q33. Indegree means —</text:h>
      <text:p text:style-name="Text_20_body">A) Number of outgoing edges<text:line-break/>B) Number of incoming edges<text:line-break/>C) Number of cycles<text:line-break/>D) Number of paths</text:p>
      <text:p text:style-name="Text_20_body"><text:span text:style-name="Strong_20_Emphasis">Answer:</text:span> B) Number of incoming edges</text:p>
      <text:p text:style-name="Horizontal_20_Line"/>
      <text:h text:style-name="Heading_20_1" text:outline-level="1">DFS Based Topological Sort</text:h>
      <text:h text:style-name="Heading_20_2" text:outline-level="2">Q34. Which data structure is used in DFS topological sort?</text:h>
      <text:p text:style-name="Text_20_body">A) Queue<text:line-break/>B) Stack<text:line-break/>C) Heap<text:line-break/>D) Tree</text:p>
      <text:p text:style-name="Text_20_body"><text:span text:style-name="Strong_20_Emphasis">Answer:</text:span> B) Stack</text:p>
      <text:p text:style-name="Horizontal_20_Line"/>
      <text:h text:style-name="Heading_20_2" text:outline-level="2">Q35. In DFS topological sort, nodes are pushed into stack —</text:h>
      <text:p text:style-name="Text_20_body">A) Before DFS<text:line-break/>B) During initialization<text:line-break/>C) After visiting neighbors<text:line-break/>D) Randomly</text:p>
      <text:p text:style-name="Text_20_body"><text:span text:style-name="Strong_20_Emphasis">Answer:</text:span> C) After visiting neighbors</text:p>
      <text:p text:style-name="Horizontal_20_Line"/>
      <text:h text:style-name="Heading_20_1" text:outline-level="1">Backtracking</text:h>
      <text:h text:style-name="Heading_20_2" text:outline-level="2">Q36. Backtracking builds solution —</text:h>
      <text:p text:style-name="Text_20_body">A) Randomly<text:line-break/>B) Incrementally<text:line-break/>C) Iteratively only<text:line-break/>D) Without recursion</text:p>
      <text:p text:style-name="Text_20_body"><text:span text:style-name="Strong_20_Emphasis">Answer:</text:span> B) Incrementally</text:p>
      <text:p text:style-name="Horizontal_20_Line"/>
      <text:h text:style-name="Heading_20_2" text:outline-level="2"><text:soft-page-break/>Q37. What happens when backtracking reaches an invalid state?</text:h>
      <text:p text:style-name="Text_20_body">A) Program stops<text:line-break/>B) Restart occurs<text:line-break/>C) Algorithm backtracks<text:line-break/>D) Graph resets</text:p>
      <text:p text:style-name="Text_20_body"><text:span text:style-name="Strong_20_Emphasis">Answer:</text:span> C) Algorithm backtracks</text:p>
      <text:p text:style-name="Horizontal_20_Line"/>
      <text:h text:style-name="Heading_20_2" text:outline-level="2">Q38. Which is an application of backtracking?</text:h>
      <text:p text:style-name="Text_20_body">A) N Queens<text:line-break/>B) MST<text:line-break/>C) Dijkstra<text:line-break/>D) Bellman-Ford</text:p>
      <text:p text:style-name="Text_20_body"><text:span text:style-name="Strong_20_Emphasis">Answer:</text:span> A) N Queens</text:p>
      <text:p text:style-name="Horizontal_20_Line"/>
      <text:h text:style-name="Heading_20_1" text:outline-level="1">Graph Coloring</text:h>
      <text:h text:style-name="Heading_20_2" text:outline-level="2">Q39. Graph coloring ensures adjacent vertices have —</text:h>
      <text:p text:style-name="Text_20_body">A) Same color<text:line-break/>B) Different colors<text:line-break/>C) Same weight<text:line-break/>D) Same degree</text:p>
      <text:p text:style-name="Text_20_body"><text:span text:style-name="Strong_20_Emphasis">Answer:</text:span> B) Different colors</text:p>
      <text:p text:style-name="Horizontal_20_Line"/>
      <text:h text:style-name="Heading_20_2" text:outline-level="2">Q40. The minimum number of colors required for a graph is called —</text:h>
      <text:p text:style-name="Text_20_body">A) Vertex Number<text:line-break/>B) Degree Number<text:line-break/>C) Chromatic Number<text:line-break/>D) Color Factor</text:p>
      <text:p text:style-name="Text_20_body"><text:span text:style-name="Strong_20_Emphasis">Answer:</text:span> C) Chromatic Number</text:p>
      <text:p text:style-name="Horizontal_20_Line"/>
      <text:h text:style-name="Heading_20_2" text:outline-level="2"><text:soft-page-break/>Q41. Coloring a graph with at most m colors is called —</text:h>
      <text:p text:style-name="Text_20_body">A) m-pathing<text:line-break/>B) m-covering<text:line-break/>C) m-coloring<text:line-break/>D) m-graphing</text:p>
      <text:p text:style-name="Text_20_body"><text:span text:style-name="Strong_20_Emphasis">Answer:</text:span> C) m-coloring</text:p>
      <text:p text:style-name="Horizontal_20_Line"/>
      <text:h text:style-name="Heading_20_1" text:outline-level="1">N Queens Problem</text:h>
      <text:h text:style-name="Heading_20_2" text:outline-level="2">Q42. In N Queens Problem, queens must not attack each other on —</text:h>
      <text:p text:style-name="Text_20_body">A) Rows only<text:line-break/>B) Columns only<text:line-break/>C) Diagonals only<text:line-break/>D) Rows, columns, and diagonals</text:p>
      <text:p text:style-name="Text_20_body"><text:span text:style-name="Strong_20_Emphasis">Answer:</text:span> D) Rows, columns, and diagonals</text:p>
      <text:p text:style-name="Horizontal_20_Line"/>
      <text:h text:style-name="Heading_20_2" text:outline-level="2">Q43. Which technique is used in N Queens Problem?</text:h>
      <text:p text:style-name="Text_20_body">A) Greedy<text:line-break/>B) Backtracking<text:line-break/>C) BFS<text:line-break/>D) DP</text:p>
      <text:p text:style-name="Text_20_body"><text:span text:style-name="Strong_20_Emphasis">Answer:</text:span> B) Backtracking</text:p>
      <text:p text:style-name="Horizontal_20_Line"/>
      <text:h text:style-name="Heading_20_1" text:outline-level="1">Branch and Bound</text:h>
      <text:h text:style-name="Heading_20_2" text:outline-level="2">Q44. Branch and Bound is mainly used for —</text:h>
      <text:p text:style-name="Text_20_body">A) Searching<text:line-break/>B) Optimization<text:line-break/>C) Traversal<text:line-break/>D) Sorting</text:p>
      <text:p text:style-name="Text_20_body"><text:span text:style-name="Strong_20_Emphasis">Answer:</text:span> B) Optimization</text:p>
      <text:p text:style-name="Horizontal_20_Line"><text:soft-page-break/></text:p>
      <text:h text:style-name="Heading_20_2" text:outline-level="2">Q45. In Branch and Bound, branching means —</text:h>
      <text:p text:style-name="Text_20_body">A) Removing nodes<text:line-break/>B) Dividing into subproblems<text:line-break/>C) Sorting edges<text:line-break/>D) Coloring nodes</text:p>
      <text:p text:style-name="Text_20_body"><text:span text:style-name="Strong_20_Emphasis">Answer:</text:span> B) Dividing into subproblems</text:p>
      <text:p text:style-name="Horizontal_20_Line"/>
      <text:h text:style-name="Heading_20_2" text:outline-level="2">Q46. Pruning means —</text:h>
      <text:p text:style-name="Text_20_body">A) Expanding nodes<text:line-break/>B) Removing unnecessary branches<text:line-break/>C) Creating cycles<text:line-break/>D) Adding edges</text:p>
      <text:p text:style-name="Text_20_body"><text:span text:style-name="Strong_20_Emphasis">Answer:</text:span> B) Removing unnecessary branches</text:p>
      <text:p text:style-name="Horizontal_20_Line"/>
      <text:h text:style-name="Heading_20_2" text:outline-level="2">Q47. FIFO Branch and Bound uses —</text:h>
      <text:p text:style-name="Text_20_body">A) Stack<text:line-break/>B) Queue<text:line-break/>C) Heap<text:line-break/>D) Array</text:p>
      <text:p text:style-name="Text_20_body"><text:span text:style-name="Strong_20_Emphasis">Answer:</text:span> B) Queue</text:p>
      <text:p text:style-name="Horizontal_20_Line"/>
      <text:h text:style-name="Heading_20_1" text:outline-level="1">Approximation Algorithm</text:h>
      <text:h text:style-name="Heading_20_2" text:outline-level="2">Q48. Approximation algorithms are mainly used for —</text:h>
      <text:p text:style-name="Text_20_body">A) Easy problems<text:line-break/>B) NP-hard problems<text:line-break/>C) Sorting problems<text:line-break/>D) Tree traversal</text:p>
      <text:p text:style-name="Text_20_body"><text:span text:style-name="Strong_20_Emphasis">Answer:</text:span> B) NP-hard problems</text:p>
      <text:p text:style-name="Horizontal_20_Line"/>
      <text:h text:style-name="Heading_20_2" text:outline-level="2"><text:soft-page-break/>Q49. Approximation algorithms provide —</text:h>
      <text:p text:style-name="Text_20_body">A) Exact solution always<text:line-break/>B) Near-optimal solution<text:line-break/>C) No solution<text:line-break/>D) Random output</text:p>
      <text:p text:style-name="Text_20_body"><text:span text:style-name="Strong_20_Emphasis">Answer:</text:span> B) Near-optimal solution</text:p>
      <text:p text:style-name="Horizontal_20_Line"/>
      <text:h text:style-name="Heading_20_1" text:outline-level="1">Traveling Salesman Problem</text:h>
      <text:h text:style-name="Heading_20_2" text:outline-level="2">Q50. TSP stands for —</text:h>
      <text:p text:style-name="Text_20_body">A) Total Shortest Path<text:line-break/>B) Traveling Salesman Problem<text:line-break/>C) Tree Spanning Problem<text:line-break/>D) Traveling Source Path</text:p>
      <text:p text:style-name="Text_20_body"><text:span text:style-name="Strong_20_Emphasis">Answer:</text:span> B) Traveling Salesman Problem</text:p>
      <text:p text:style-name="Horizontal_20_Line"/>
      <text:h text:style-name="Heading_20_2" text:outline-level="2">Q51. TSP requires visiting each city —</text:h>
      <text:p text:style-name="Text_20_body">A) Twice<text:line-break/>B) Randomly<text:line-break/>C) Exactly once<text:line-break/>D) Infinitely</text:p>
      <text:p text:style-name="Text_20_body"><text:span text:style-name="Strong_20_Emphasis">Answer:</text:span> C) Exactly once</text:p>
      <text:p text:style-name="Horizontal_20_Line"/>
      <text:h text:style-name="Heading_20_2" text:outline-level="2">Q52. TSP is a —</text:h>
      <text:p text:style-name="Text_20_body">A) Polynomial problem<text:line-break/>B) NP-hard problem<text:line-break/>C) Sorting problem<text:line-break/>D) DFS problem</text:p>
      <text:p text:style-name="Text_20_body"><text:span text:style-name="Strong_20_Emphasis">Answer:</text:span> B) NP-hard problem</text:p>
      <text:p text:style-name="Horizontal_20_Line"/>
      <text:h text:style-name="Heading_20_2" text:outline-level="2"><text:soft-page-break/>Q53. TSP approximation algorithm uses —</text:h>
      <text:p text:style-name="Text_20_body">A) DFS Tree<text:line-break/>B) Binary Tree<text:line-break/>C) Minimum Spanning Tree<text:line-break/>D) Heap Tree</text:p>
      <text:p text:style-name="Text_20_body"><text:span text:style-name="Strong_20_Emphasis">Answer:</text:span> C) Minimum Spanning Tree</text:p>
      <text:p text:style-name="Horizontal_20_Line"/>
      <text:h text:style-name="Heading_20_2" text:outline-level="2">Q54. Triangle Inequality states that direct path should be —</text:h>
      <text:p text:style-name="Text_20_body">A) More expensive<text:line-break/>B) Less or equal expensive<text:line-break/>C) Infinite<text:line-break/>D) Negative</text:p>
      <text:p text:style-name="Text_20_body"><text:span text:style-name="Strong_20_Emphasis">Answer:</text:span> B) Less or equal expensive</text:p>
      <text:p text:style-name="Horizontal_20_Line"/>
      <text:h text:style-name="Heading_20_1" text:outline-level="1">Vertex Cover Problem</text:h>
      <text:h text:style-name="Heading_20_2" text:outline-level="2">Q55. A vertex cover covers —</text:h>
      <text:p text:style-name="Text_20_body">A) Vertices only<text:line-break/>B) Cycles only<text:line-break/>C) All edges<text:line-break/>D) Only source node</text:p>
      <text:p text:style-name="Text_20_body"><text:span text:style-name="Strong_20_Emphasis">Answer:</text:span> C) All edges</text:p>
      <text:p text:style-name="Horizontal_20_Line"/>
      <text:h text:style-name="Heading_20_2" text:outline-level="2">Q56. Vertex Cover Problem is generally defined on —</text:h>
      <text:p text:style-name="Text_20_body">A) Directed Graph<text:line-break/>B) Undirected Graph<text:line-break/>C) Tree only<text:line-break/>D) DAG only</text:p>
      <text:p text:style-name="Text_20_body"><text:span text:style-name="Strong_20_Emphasis">Answer:</text:span> B) Undirected Graph</text:p>
      <text:p text:style-name="Horizontal_20_Line"/>
      <text:h text:style-name="Heading_20_2" text:outline-level="2"><text:soft-page-break/>Q57. Goal of Vertex Cover Problem is to find —</text:h>
      <text:p text:style-name="Text_20_body">A) Maximum spanning tree<text:line-break/>B) Minimum vertex set<text:line-break/>C) Shortest path<text:line-break/>D) Longest edge</text:p>
      <text:p text:style-name="Text_20_body"><text:span text:style-name="Strong_20_Emphasis">Answer:</text:span> B) Minimum vertex set</text:p>
      <text:p text:style-name="Horizontal_20_Line"/>
      <text:h text:style-name="Heading_20_2" text:outline-level="2">Q58. A real-life application of Vertex Cover is —</text:h>
      <text:p text:style-name="Text_20_body">A) CPU scheduling<text:line-break/>B) Traffic camera placement<text:line-break/>C) File compression<text:line-break/>D) Encryption</text:p>
      <text:p text:style-name="Text_20_body"><text:span text:style-name="Strong_20_Emphasis">Answer:</text:span> B) Traffic camera placement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0T03:55:46.932187426</meta:creation-date>
    <dc:date>2026-05-10T03:56:45.470804114</dc:date>
    <meta:editing-duration>PT58S</meta:editing-duration>
    <meta:editing-cycles>1</meta:editing-cycles>
    <meta:document-statistic meta:table-count="0" meta:image-count="0" meta:object-count="0" meta:page-count="15" meta:paragraph-count="192" meta:word-count="1394" meta:character-count="8307" meta:non-whitespace-character-count="7062"/>
    <meta:generator>LibreOffice/26.2.3.2$Linux_X86_64 LibreOffice_project/70e089b17412e4cb7773e41413306b17a2328c34</meta:generator>
  </office:meta>
</office:document-meta>
</file>