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ory Notes (From Slides)</text:h>
      <text:h text:style-name="Heading_20_1" text:outline-level="1">1. Greedy Technique</text:h>
      <text:h text:style-name="Heading_20_2" text:outline-level="2">Introduction</text:h>
      <text:p text:style-name="Text_20_body">The greedy method is a problem-solving strategy where decisions are made by selecting the best option available at the moment without considering future consequences. It builds a solution step by step by always choosing the immediate best option. Greedy algorithms are mainly used for optimization problems.</text:p>
      <text:h text:style-name="Heading_20_2" text:outline-level="2">Properties of Greedy Algorithms</text:h>
      <text:h text:style-name="Heading_20_3" text:outline-level="3">Greedy Choice Property</text:h>
      <text:p text:style-name="Text_20_body">The optimal solution can be constructed by making the best local choice at each step.</text:p>
      <text:h text:style-name="Heading_20_3" text:outline-level="3">Optimal Substructure</text:h>
      <text:p text:style-name="Text_20_body">The optimal solution to a problem contains the optimal solutions to its subproblems.</text:p>
      <text:h text:style-name="Heading_20_2" text:outline-level="2">Working Procedure of Greedy Algorithm</text:h>
      <text:list text:style-name="L1">
        <text:list-item>
          <text:p text:style-name="P1">Start with the initial state.</text:p>
        </text:list-item>
        <text:list-item>
          <text:p text:style-name="P1">Consider all available choices.</text:p>
        </text:list-item>
        <text:list-item>
          <text:p text:style-name="P1">Select the best choice at that moment.</text:p>
        </text:list-item>
        <text:list-item>
          <text:p text:style-name="P1">Move to the next state.</text:p>
        </text:list-item>
        <text:list-item>
          <text:p text:style-name="P1">Repeat until the goal is achieved.</text:p>
        </text:list-item>
      </text:list>
      <text:h text:style-name="Heading_20_2" text:outline-level="2">Limitation of Greedy Algorithm</text:h>
      <text:p text:style-name="Text_20_body">Greedy algorithms do not always produce the optimal solution. In problems such as Coin Change and 0/1 Knapsack, Dynamic Programming gives better results.</text:p>
      <text:p text:style-name="Horizontal_20_Line"/>
      <text:h text:style-name="Heading_20_1" text:outline-level="1"><text:soft-page-break/>2. Fractional Knapsack Problem</text:h>
      <text:h text:style-name="Heading_20_2" text:outline-level="2">Definition</text:h>
      <text:p text:style-name="Text_20_body">Given arrays of profits and weights and a knapsack capacity W, the goal is to maximize total profit without exceeding capacity. Items can be taken fractionally if needed.</text:p>
      <text:h text:style-name="Heading_20_2" text:outline-level="2">Greedy Approaches</text:h>
      <text:list text:style-name="L2">
        <text:list-item>
          <text:p text:style-name="P2">Selecting smaller weights first</text:p>
        </text:list-item>
        <text:list-item>
          <text:p text:style-name="P2">Selecting larger profits first</text:p>
        </text:list-item>
        <text:list-item>
          <text:p text:style-name="P2">Selecting by profit/weight ratio</text:p>
        </text:list-item>
      </text:list>
      <text:p text:style-name="Text_20_body">The profit/weight ratio method gives the best result.</text:p>
      <text:p text:style-name="Horizontal_20_Line"/>
      <text:h text:style-name="Heading_20_1" text:outline-level="1">3. Minimum Spanning Tree (MST)</text:h>
      <text:h text:style-name="Heading_20_2" text:outline-level="2">Spanning Tree</text:h>
      <text:p text:style-name="Text_20_body">A spanning tree of a graph is a subgraph that:</text:p>
      <text:list text:style-name="L3">
        <text:list-item>
          <text:p text:style-name="P3">Contains all vertices</text:p>
        </text:list-item>
        <text:list-item>
          <text:p text:style-name="P3">Is itself a tree</text:p>
        </text:list-item>
      </text:list>
      <text:p text:style-name="Text_20_body">A graph may contain many spanning trees.</text:p>
      <text:h text:style-name="Heading_20_2" text:outline-level="2">Minimum Spanning Tree</text:h>
      <text:p text:style-name="Text_20_body">The Minimum Spanning Tree is the spanning tree with the minimum total cost.</text:p>
      <text:h text:style-name="Heading_20_2" text:outline-level="2">Algorithms for MST</text:h>
      <text:list text:style-name="L4">
        <text:list-item>
          <text:p text:style-name="P4">Kruskal’s Algorithm</text:p>
        </text:list-item>
        <text:list-item>
          <text:p text:style-name="P4">Prim’s Algorithm</text:p>
        </text:list-item>
      </text:list>
      <text:p text:style-name="Horizontal_20_Line"/>
      <text:h text:style-name="Heading_20_1" text:outline-level="1"><text:soft-page-break/>4. Kruskal’s Algorithm</text:h>
      <text:h text:style-name="Heading_20_2" text:outline-level="2">Definition</text:h>
      <text:p text:style-name="Text_20_body">Kruskal’s algorithm creates a forest of trees. Initially, every node is considered as a separate tree. The algorithm repeatedly adds the cheapest edge that does not create a cycle.</text:p>
      <text:h text:style-name="Heading_20_2" text:outline-level="2">Steps of Kruskal’s Algorithm</text:h>
      <text:list text:style-name="L5">
        <text:list-item>
          <text:p text:style-name="P5">Construct a forest with each node in a separate tree.</text:p>
        </text:list-item>
        <text:list-item>
          <text:p text:style-name="P5">Place all edges in a priority queue.</text:p>
        </text:list-item>
        <text:list-item>
          <text:p text:style-name="P5">Extract the minimum cost edge.</text:p>
        </text:list-item>
        <text:list-item>
          <text:p text:style-name="P5">If it forms a cycle, reject it.</text:p>
        </text:list-item>
        <text:list-item>
          <text:p text:style-name="P5">Otherwise, add it to the forest.</text:p>
        </text:list-item>
        <text:list-item>
          <text:p text:style-name="P5">Continue until n−1 edges are added.</text:p>
        </text:list-item>
      </text:list>
      <text:h text:style-name="Heading_20_2" text:outline-level="2">Important Point</text:h>
      <text:p text:style-name="Text_20_body">Edges creating cycles are not added to the spanning tree.</text:p>
      <text:p text:style-name="Horizontal_20_Line"/>
      <text:h text:style-name="Heading_20_1" text:outline-level="1">5. Single Source Shortest Path (SSSP)</text:h>
      <text:h text:style-name="Heading_20_2" text:outline-level="2">Definition</text:h>
      <text:p text:style-name="Text_20_body">The shortest path problem finds the minimum cost path between nodes in a graph.</text:p>
      <text:h text:style-name="Heading_20_2" text:outline-level="2">Path</text:h>
      <text:p text:style-name="Text_20_body">A path is a sequence of vertices such that every consecutive pair of vertices has an edge between them.</text:p>
      <text:h text:style-name="Heading_20_2" text:outline-level="2">Cost of a Path</text:h>
      <text:p text:style-name="Text_20_body">In weighted graphs, the cost of a path is the sum of all edge weights along that path.</text:p>
      <text:h text:style-name="Heading_20_2" text:outline-level="2">Variations of Shortest Path</text:h>
      <text:list text:style-name="L6">
        <text:list-item>
          <text:p text:style-name="P6">Single-pair shortest path</text:p>
        </text:list-item>
        <text:list-item>
          <text:p text:style-name="P6">Single-source shortest path</text:p>
        </text:list-item>
        <text:list-item>
          <text:p text:style-name="P6"><text:soft-page-break/>Single-destination shortest path</text:p>
        </text:list-item>
        <text:list-item>
          <text:p text:style-name="P6">All-pair shortest path</text:p>
        </text:list-item>
      </text:list>
      <text:p text:style-name="Horizontal_20_Line"/>
      <text:h text:style-name="Heading_20_1" text:outline-level="1">6. Dijkstra’s Algorithm</text:h>
      <text:h text:style-name="Heading_20_2" text:outline-level="2">Definition</text:h>
      <text:p text:style-name="Text_20_body">Dijkstra’s algorithm is used for solving single-source shortest path problems in weighted graphs. It uses a greedy approach.</text:p>
      <text:h text:style-name="Heading_20_2" text:outline-level="2">Characteristics</text:h>
      <text:list text:style-name="L7">
        <text:list-item>
          <text:p text:style-name="P7">Used in maps and navigation systems</text:p>
        </text:list-item>
        <text:list-item>
          <text:p text:style-name="P7">Works for directed and undirected graphs</text:p>
        </text:list-item>
        <text:list-item>
          <text:p text:style-name="P7">Does not work with negative edge weights</text:p>
        </text:list-item>
      </text:list>
      <text:h text:style-name="Heading_20_2" text:outline-level="2">Working Procedure</text:h>
      <text:list text:style-name="L8">
        <text:list-item>
          <text:p text:style-name="P8">Mark all nodes as unvisited.</text:p>
        </text:list-item>
        <text:list-item>
          <text:p text:style-name="P8">Set source distance to 0 and others to infinity.</text:p>
        </text:list-item>
        <text:list-item>
          <text:p text:style-name="P8">Select the unvisited node with minimum distance.</text:p>
        </text:list-item>
        <text:list-item>
          <text:p text:style-name="P8">Update distances of neighboring nodes.</text:p>
        </text:list-item>
        <text:list-item>
          <text:p text:style-name="P8">Mark the current node as visited.</text:p>
        </text:list-item>
        <text:list-item>
          <text:p text:style-name="P8">Repeat until all nodes are visited.</text:p>
        </text:list-item>
      </text:list>
      <text:h text:style-name="Heading_20_2" text:outline-level="2">Relaxation Condition</text:h>
      <text:p text:style-name="Text_20_body">d(u)+c(u,v)&lt;d(v)</text:p>
      <text:p text:style-name="Text_20_body">Then update:<text:line-break/>d(v)=d(u)+c(u,v)</text:p>
      <text:p text:style-name="Horizontal_20_Line"/>
      <text:h text:style-name="Heading_20_1" text:outline-level="1"><text:soft-page-break/>7. Bellman-Ford Algorithm</text:h>
      <text:h text:style-name="Heading_20_2" text:outline-level="2">Definition</text:h>
      <text:p text:style-name="Text_20_body">Bellman-Ford algorithm is used to find shortest paths in graphs containing negative edge weights.</text:p>
      <text:h text:style-name="Heading_20_2" text:outline-level="2">Main Idea</text:h>
      <text:p text:style-name="Text_20_body">The algorithm repeatedly relaxes all edges.</text:p>
      <text:h text:style-name="Heading_20_2" text:outline-level="2">Relaxation Formula</text:h>
      <text:p text:style-name="Text_20_body">D[U]+D[U,V]&lt;D[V]</text:p>
      <text:p text:style-name="Text_20_body">If true:<text:line-break/>D[V]=D[U]+D[U,V]</text:p>
      <text:h text:style-name="Heading_20_2" text:outline-level="2">Steps of Bellman-Ford Algorithm</text:h>
      <text:list text:style-name="L9">
        <text:list-item>
          <text:p text:style-name="P9">Initialize all distances as infinity.</text:p>
        </text:list-item>
        <text:list-item>
          <text:p text:style-name="P9">Set source distance to 0.</text:p>
        </text:list-item>
        <text:list-item>
          <text:p text:style-name="P9">Relax all edges V−1 times.</text:p>
        </text:list-item>
        <text:list-item>
          <text:p text:style-name="P9">Check all edges once more.</text:p>
        </text:list-item>
        <text:list-item>
          <text:p text:style-name="P9">If any distance changes in the V-th iteration, a negative cycle exists.</text:p>
        </text:list-item>
      </text:list>
      <text:h text:style-name="Heading_20_2" text:outline-level="2">Negative Weight Cycle</text:h>
      <text:p text:style-name="Text_20_body">A change in the V-th iteration indicates the presence of a negative weight cycle.</text:p>
      <text:p text:style-name="Horizontal_20_Line"/>
      <text:h text:style-name="Heading_20_1" text:outline-level="1">8. Topological Sort</text:h>
      <text:h text:style-name="Heading_20_2" text:outline-level="2">Definition</text:h>
      <text:p text:style-name="Text_20_body">Topological sorting is a linear ordering of vertices in a Directed Acyclic Graph (DAG) such that if there is an edge u → v, then u appears before v.</text:p>
      <text:h text:style-name="Heading_20_2" text:outline-level="2">Conditions</text:h>
      <text:p text:style-name="Text_20_body">Topological sorting is only possible for Directed Acyclic Graphs (DAGs).</text:p>
      <text:h text:style-name="Heading_20_2" text:outline-level="2"><text:soft-page-break/>Why Not Possible for Undirected or Cyclic Graphs</text:h>
      <text:h text:style-name="Heading_20_3" text:outline-level="3">Undirected Graph</text:h>
      <text:p text:style-name="Text_20_body">Every edge can be treated in both directions, so ordering becomes impossible.</text:p>
      <text:h text:style-name="Heading_20_3" text:outline-level="3">Cyclic Graph</text:h>
      <text:p text:style-name="Text_20_body">In a cycle like u→v→w→u, dependencies become impossible to satisfy.</text:p>
      <text:p text:style-name="Horizontal_20_Line"/>
      <text:h text:style-name="Heading_20_1" text:outline-level="1">9. Kahn’s Algorithm</text:h>
      <text:h text:style-name="Heading_20_2" text:outline-level="2">Definition</text:h>
      <text:p text:style-name="Text_20_body">Kahn’s Algorithm is a BFS-based method for topological sorting.</text:p>
      <text:h text:style-name="Heading_20_2" text:outline-level="2">Steps</text:h>
      <text:list text:style-name="L10">
        <text:list-item>
          <text:p text:style-name="P10">Calculate indegree of every vertex.</text:p>
        </text:list-item>
        <text:list-item>
          <text:p text:style-name="P10">Insert all vertices with indegree 0 into a queue.</text:p>
        </text:list-item>
        <text:list-item>
          <text:p text:style-name="P10">Remove a vertex from the queue and add it to the result.</text:p>
        </text:list-item>
        <text:list-item>
          <text:p text:style-name="P10">Reduce indegree of adjacent vertices.</text:p>
        </text:list-item>
        <text:list-item>
          <text:p text:style-name="P10">If indegree becomes 0, insert into queue.</text:p>
        </text:list-item>
        <text:list-item>
          <text:p text:style-name="P10">Continue until queue becomes empty.</text:p>
        </text:list-item>
      </text:list>
      <text:p text:style-name="Horizontal_20_Line"/>
      <text:h text:style-name="Heading_20_1" text:outline-level="1">10. DFS Based Topological Sort</text:h>
      <text:h text:style-name="Heading_20_2" text:outline-level="2">Main Idea</text:h>
      <text:p text:style-name="Text_20_body">DFS traversal is performed and vertices are pushed into a stack during backtracking.</text:p>
      <text:h text:style-name="Heading_20_2" text:outline-level="2">Steps</text:h>
      <text:list text:style-name="L11">
        <text:list-item>
          <text:p text:style-name="P11">Start DFS from an unvisited node.</text:p>
        </text:list-item>
        <text:list-item>
          <text:p text:style-name="P11">Visit all neighbors recursively.</text:p>
        </text:list-item>
        <text:list-item>
          <text:p text:style-name="P11">Push the node into stack after visiting all neighbors.</text:p>
        </text:list-item>
        <text:list-item>
          <text:p text:style-name="P11">Pop elements from stack to get topological order.</text:p>
        </text:list-item>
      </text:list>
      <text:p text:style-name="Horizontal_20_Line"><text:soft-page-break/></text:p>
      <text:h text:style-name="Heading_20_1" text:outline-level="1">11. Backtracking</text:h>
      <text:h text:style-name="Heading_20_2" text:outline-level="2">Definition</text:h>
      <text:p text:style-name="Text_20_body">Backtracking is an algorithmic technique where solutions are built incrementally and abandoned when they lead to invalid states or dead ends.</text:p>
      <text:h text:style-name="Heading_20_2" text:outline-level="2">Working Procedure</text:h>
      <text:list text:style-name="L12">
        <text:list-item>
          <text:p text:style-name="P12">Choose</text:p>
        </text:list-item>
        <text:list-item>
          <text:p text:style-name="P12">Explore</text:p>
        </text:list-item>
        <text:list-item>
          <text:p text:style-name="P12">Check validity</text:p>
        </text:list-item>
        <text:list-item>
          <text:p text:style-name="P12">Backtrack</text:p>
        </text:list-item>
        <text:list-item>
          <text:p text:style-name="P12">Repeat</text:p>
        </text:list-item>
      </text:list>
      <text:h text:style-name="Heading_20_2" text:outline-level="2">Applications</text:h>
      <text:list text:style-name="L13">
        <text:list-item>
          <text:p text:style-name="P13">Sudoku solving</text:p>
        </text:list-item>
        <text:list-item>
          <text:p text:style-name="P13">N Queens Problem</text:p>
        </text:list-item>
        <text:list-item>
          <text:p text:style-name="P13">Graph Coloring</text:p>
        </text:list-item>
        <text:list-item>
          <text:p text:style-name="P13">Robotic Path Planning</text:p>
        </text:list-item>
      </text:list>
      <text:p text:style-name="Horizontal_20_Line"/>
      <text:h text:style-name="Heading_20_1" text:outline-level="1">12. Graph Coloring Problem</text:h>
      <text:h text:style-name="Heading_20_2" text:outline-level="2">Definition</text:h>
      <text:p text:style-name="Text_20_body">Graph coloring is assigning colors to graph vertices such that no two adjacent vertices have the same color.</text:p>
      <text:h text:style-name="Heading_20_2" text:outline-level="2">m-Coloring</text:h>
      <text:p text:style-name="Text_20_body">If at most m colors are used, it is called m-coloring.</text:p>
      <text:h text:style-name="Heading_20_2" text:outline-level="2">Chromatic Number</text:h>
      <text:p text:style-name="Text_20_body">The minimum number of colors needed to color a graph is called its chromatic number.</text:p>
      <text:h text:style-name="Heading_20_2" text:outline-level="2"><text:soft-page-break/>Applications</text:h>
      <text:list text:style-name="L14">
        <text:list-item>
          <text:p text:style-name="P14">Map coloring</text:p>
        </text:list-item>
        <text:list-item>
          <text:p text:style-name="P14">Timetable design</text:p>
        </text:list-item>
      </text:list>
      <text:p text:style-name="Horizontal_20_Line"/>
      <text:h text:style-name="Heading_20_1" text:outline-level="1">13. N Queens Problem</text:h>
      <text:h text:style-name="Heading_20_2" text:outline-level="2">Definition</text:h>
      <text:p text:style-name="Text_20_body">The N-Queens problem places N queens on an N×N chessboard so that no two queens attack each other.</text:p>
      <text:h text:style-name="Heading_20_2" text:outline-level="2">Conditions</text:h>
      <text:p text:style-name="Text_20_body">Queens must not share:</text:p>
      <text:list text:style-name="L15">
        <text:list-item>
          <text:p text:style-name="P15">Same row</text:p>
        </text:list-item>
        <text:list-item>
          <text:p text:style-name="P15">Same column</text:p>
        </text:list-item>
        <text:list-item>
          <text:p text:style-name="P15">Same diagonal</text:p>
        </text:list-item>
      </text:list>
      <text:h text:style-name="Heading_20_2" text:outline-level="2">Solution Idea</text:h>
      <text:p text:style-name="Text_20_body">Queens are placed row by row. If a position becomes unsafe, the algorithm backtracks and tries another position.</text:p>
      <text:p text:style-name="Horizontal_20_Line"/>
      <text:h text:style-name="Heading_20_1" text:outline-level="1">14. Branch and Bound</text:h>
      <text:h text:style-name="Heading_20_2" text:outline-level="2">Definition</text:h>
      <text:p text:style-name="Text_20_body">Branch and Bound is an optimization technique used to find optimal solutions for combinatorial and mathematical optimization problems.</text:p>
      <text:h text:style-name="Heading_20_2" text:outline-level="2">Main Concepts</text:h>
      <text:h text:style-name="Heading_20_3" text:outline-level="3">Branching</text:h>
      <text:p text:style-name="Text_20_body">Breaking the main problem into smaller subproblems.</text:p>
      <text:h text:style-name="Heading_20_3" text:outline-level="3"><text:soft-page-break/>Bounding</text:h>
      <text:p text:style-name="Text_20_body">Calculating upper or lower bounds for subproblems.</text:p>
      <text:h text:style-name="Heading_20_3" text:outline-level="3">Pruning</text:h>
      <text:p text:style-name="Text_20_body">Discarding branches that cannot produce better solutions.</text:p>
      <text:h text:style-name="Heading_20_2" text:outline-level="2">Applications</text:h>
      <text:list text:style-name="L16">
        <text:list-item>
          <text:p text:style-name="P16">Discrete optimization</text:p>
        </text:list-item>
        <text:list-item>
          <text:p text:style-name="P16">Integer programming</text:p>
        </text:list-item>
        <text:list-item>
          <text:p text:style-name="P16">Network flow problems</text:p>
        </text:list-item>
      </text:list>
      <text:h text:style-name="Heading_20_2" text:outline-level="2">FIFO Branch and Bound</text:h>
      <text:p text:style-name="Text_20_body">Uses queue and performs Breadth First Search (BFS).</text:p>
      <text:h text:style-name="Heading_20_2" text:outline-level="2">0/1 Knapsack Problem</text:h>
      <text:p text:style-name="Text_20_body">Each item can either be taken completely or not taken at all.</text:p>
      <text:h text:style-name="Heading_20_2" text:outline-level="2">Why Dynamic Programming is Better</text:h>
      <text:p text:style-name="Text_20_body">For classic 0/1 knapsack:<text:line-break/>O(n\times W)</text:p>
      <text:p text:style-name="Text_20_body">Dynamic Programming guarantees an optimal solution.</text:p>
      <text:p text:style-name="Horizontal_20_Line"/>
      <text:h text:style-name="Heading_20_1" text:outline-level="1">15. Approximation Algorithm</text:h>
      <text:h text:style-name="Heading_20_2" text:outline-level="2">Definition</text:h>
      <text:p text:style-name="Text_20_body">Approximation algorithms are algorithms designed to find near-optimal solutions for NP-hard problems.</text:p>
      <text:h text:style-name="Heading_20_2" text:outline-level="2">Why Needed</text:h>
      <text:p text:style-name="Text_20_body">Exact solutions for NP-hard problems are computationally infeasible in polynomial time.</text:p>
      <text:h text:style-name="Heading_20_2" text:outline-level="2">Approximate Solution</text:h>
      <text:p text:style-name="Text_20_body">A feasible solution close to the optimal solution is called an approximate solution.</text:p>
      <text:p text:style-name="Horizontal_20_Line"><text:soft-page-break/></text:p>
      <text:h text:style-name="Heading_20_1" text:outline-level="1">16. Traveling Salesman Problem (TSP)</text:h>
      <text:h text:style-name="Heading_20_2" text:outline-level="2">Definition</text:h>
      <text:p text:style-name="Text_20_body">The Traveling Salesman Problem requires visiting all cities exactly once and returning to the starting city with minimum total cost.</text:p>
      <text:h text:style-name="Heading_20_2" text:outline-level="2">Characteristics</text:h>
      <text:list text:style-name="L17">
        <text:list-item>
          <text:p text:style-name="P17">NP-hard problem</text:p>
        </text:list-item>
        <text:list-item>
          <text:p text:style-name="P17">No polynomial-time exact solution exists</text:p>
        </text:list-item>
      </text:list>
      <text:h text:style-name="Heading_20_2" text:outline-level="2">Triangle Inequality</text:h>
      <text:p text:style-name="Text_20_body">d(A,C)\le d(A,B)+d(B,C)</text:p>
      <text:p text:style-name="Text_20_body">Direct travel from A to C should not cost more than traveling through B.</text:p>
      <text:h text:style-name="Heading_20_2" text:outline-level="2">TSP Approximation Steps</text:h>
      <text:list text:style-name="L18">
        <text:list-item>
          <text:p text:style-name="P18">Choose a starting vertex.</text:p>
        </text:list-item>
        <text:list-item>
          <text:p text:style-name="P18">Construct a Minimum Spanning Tree.</text:p>
        </text:list-item>
        <text:list-item>
          <text:p text:style-name="P18">Perform preorder traversal.</text:p>
        </text:list-item>
        <text:list-item>
          <text:p text:style-name="P18">Use traversal order as Hamiltonian path.</text:p>
        </text:list-item>
      </text:list>
      <text:p text:style-name="Horizontal_20_Line"/>
      <text:h text:style-name="Heading_20_1" text:outline-level="1">17. Vertex Cover Problem</text:h>
      <text:h text:style-name="Heading_20_2" text:outline-level="2">Definition</text:h>
      <text:p text:style-name="Text_20_body">A vertex cover is a subset of vertices such that every edge in the graph has at least one endpoint in the subset.</text:p>
      <text:h text:style-name="Heading_20_2" text:outline-level="2">Goal</text:h>
      <text:p text:style-name="Text_20_body">Find the minimum size vertex cover.</text:p>
      <text:h text:style-name="Heading_20_2" text:outline-level="2"><text:soft-page-break/>Approximation Algorithm Steps</text:h>
      <text:list text:style-name="L19">
        <text:list-item>
          <text:p text:style-name="P19">Select any edge randomly.</text:p>
        </text:list-item>
        <text:list-item>
          <text:p text:style-name="P19">Add both endpoints to the output set.</text:p>
        </text:list-item>
        <text:list-item>
          <text:p text:style-name="P19">Remove all incident edges.</text:p>
        </text:list-item>
        <text:list-item>
          <text:p text:style-name="P19">Repeat until all edges are covered.</text:p>
        </text:list-item>
      </text:list>
      <text:h text:style-name="Heading_20_2" text:outline-level="2">Applications</text:h>
      <text:p text:style-name="Text_20_body">Used in traffic camera placement system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0T03:50:26.542021012</meta:creation-date>
    <dc:date>2026-05-10T03:57:43.671703418</dc:date>
    <meta:editing-duration>PT7M18S</meta:editing-duration>
    <meta:editing-cycles>1</meta:editing-cycles>
    <meta:document-statistic meta:table-count="0" meta:image-count="0" meta:object-count="0" meta:page-count="11" meta:paragraph-count="209" meta:word-count="1295" meta:character-count="7978" meta:non-whitespace-character-count="6965"/>
    <meta:generator>LibreOffice/26.2.3.2$Linux_X86_64 LibreOffice_project/70e089b17412e4cb7773e41413306b17a2328c34</meta:generator>
  </office:meta>
</office:document-meta>
</file>